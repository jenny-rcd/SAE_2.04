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8db" officeooo:paragraph-rsid="001058db"/>
    </style:style>
    <style:style style:name="P2" style:family="paragraph" style:parent-style-name="Standard">
      <style:text-properties officeooo:rsid="001058db" officeooo:paragraph-rsid="0014a716"/>
    </style:style>
    <style:style style:name="P3" style:family="paragraph" style:parent-style-name="Standard">
      <style:text-properties officeooo:rsid="001058db" officeooo:paragraph-rsid="0015598b"/>
    </style:style>
    <style:style style:name="P4" style:family="paragraph" style:parent-style-name="Standard">
      <style:text-properties officeooo:rsid="001058db" officeooo:paragraph-rsid="001755ab"/>
    </style:style>
    <style:style style:name="P5" style:family="paragraph" style:parent-style-name="Standard">
      <style:text-properties officeooo:rsid="001058db" officeooo:paragraph-rsid="0018fc2b"/>
    </style:style>
    <style:style style:name="P6" style:family="paragraph" style:parent-style-name="Standard">
      <style:text-properties officeooo:rsid="001058db" officeooo:paragraph-rsid="0019885b"/>
    </style:style>
    <style:style style:name="T1" style:family="text">
      <style:text-properties style:font-name="Liberation Serif"/>
    </style:style>
    <style:style style:name="T2" style:family="text">
      <style:text-properties style:text-position="sub 58%" style:font-name="Liberation Serif1" officeooo:rsid="0010ad9b"/>
    </style:style>
    <style:style style:name="T3" style:family="text">
      <style:text-properties style:text-position="sub 58%" style:font-name="Liberation Serif1" officeooo:rsid="0013c5e5"/>
    </style:style>
    <style:style style:name="T4" style:family="text">
      <style:text-properties style:text-position="sub 58%" style:font-name="Liberation Serif1" officeooo:rsid="0010ad9b" style:font-name-asian="NSimSun" style:font-name-complex="Lucida Sans1"/>
    </style:style>
    <style:style style:name="T5" style:family="text">
      <style:text-properties style:text-position="sub 58%" style:font-name="Liberation Serif1" officeooo:rsid="0013c5e5" style:font-name-asian="NSimSun" style:font-name-complex="Lucida Sans1"/>
    </style:style>
    <style:style style:name="T6" style:family="text">
      <style:text-properties style:text-position="sub 58%" style:font-name="Liberation Serif1" officeooo:rsid="0015598b" style:font-name-asian="NSimSun" style:font-name-complex="Lucida Sans1"/>
    </style:style>
    <style:style style:name="T7" style:family="text">
      <style:text-properties style:text-position="sub 58%" style:font-name="Liberation Serif1" officeooo:rsid="001755ab" style:font-name-asian="NSimSun" style:font-name-complex="Lucida Sans1"/>
    </style:style>
    <style:style style:name="T8" style:family="text">
      <style:text-properties style:text-position="sub 58%" style:font-name="Liberation Serif" officeooo:rsid="0012ab40"/>
    </style:style>
    <style:style style:name="T9" style:family="text">
      <style:text-properties style:text-position="sub 58%" style:font-name="Liberation Serif" officeooo:rsid="0014a716"/>
    </style:style>
    <style:style style:name="T10" style:family="text">
      <style:text-properties style:text-position="sub 58%" style:font-name="Liberation Serif" officeooo:rsid="0012ab40" style:font-name-asian="NSimSun" style:font-name-complex="Lucida Sans1"/>
    </style:style>
    <style:style style:name="T11" style:family="text">
      <style:text-properties style:text-position="sub 58%" style:font-name="Liberation Serif" officeooo:rsid="0014a716" style:font-name-asian="NSimSun" style:font-name-complex="Lucida Sans1"/>
    </style:style>
    <style:style style:name="T12" style:family="text">
      <style:text-properties style:text-position="sub 58%" style:font-name="Liberation Serif" officeooo:rsid="0015598b" style:font-name-asian="NSimSun" style:font-name-complex="Lucida Sans1"/>
    </style:style>
    <style:style style:name="T13" style:family="text">
      <style:text-properties style:text-position="0% 100%" style:font-name="Liberation Serif" officeooo:rsid="0010ad9b"/>
    </style:style>
    <style:style style:name="T14" style:family="text">
      <style:text-properties style:text-position="0% 100%" style:font-name="Liberation Serif" officeooo:rsid="0012ab40"/>
    </style:style>
    <style:style style:name="T15" style:family="text">
      <style:text-properties style:text-position="0% 100%" style:font-name="Liberation Serif" officeooo:rsid="0013c5e5"/>
    </style:style>
    <style:style style:name="T16" style:family="text">
      <style:text-properties style:text-position="0% 100%" style:font-name="Liberation Serif" officeooo:rsid="0014a716" style:font-name-asian="Liberation Serif" style:font-name-complex="Liberation Serif"/>
    </style:style>
    <style:style style:name="T17" style:family="text">
      <style:text-properties style:text-position="0% 100%" style:font-name="Liberation Serif" officeooo:rsid="0015598b" style:font-name-asian="Liberation Serif" style:font-name-complex="Liberation Serif"/>
    </style:style>
    <style:style style:name="T18" style:family="text">
      <style:text-properties style:text-position="0% 100%" style:font-name="Liberation Serif" officeooo:rsid="0012ab40" style:font-name-asian="NSimSun" style:font-name-complex="Lucida Sans1"/>
    </style:style>
    <style:style style:name="T19" style:family="text">
      <style:text-properties style:text-position="0% 100%" style:font-name="Liberation Serif" officeooo:rsid="0014a716" style:font-name-asian="NSimSun" style:font-name-complex="Lucida Sans1"/>
    </style:style>
    <style:style style:name="T20" style:family="text">
      <style:text-properties style:text-position="0% 100%" style:font-name="Liberation Serif" officeooo:rsid="0013c5e5" style:font-name-asian="NSimSun" style:font-name-complex="Lucida Sans1"/>
    </style:style>
    <style:style style:name="T21" style:family="text">
      <style:text-properties style:text-position="0% 100%" style:font-name="Liberation Serif" officeooo:rsid="0010ad9b" style:font-name-asian="NSimSun" style:font-name-complex="Lucida Sans1"/>
    </style:style>
    <style:style style:name="T22" style:family="text">
      <style:text-properties style:text-position="0% 100%" style:font-name="Liberation Serif1" officeooo:rsid="0010ad9b"/>
    </style:style>
    <style:style style:name="T23" style:family="text">
      <style:text-properties style:text-position="0% 100%" style:font-name="Liberation Serif1" officeooo:rsid="0012ab40"/>
    </style:style>
    <style:style style:name="T24" style:family="text">
      <style:text-properties style:text-position="0% 100%" style:font-name="Liberation Serif1" officeooo:rsid="0013c5e5"/>
    </style:style>
    <style:style style:name="T25" style:family="text">
      <style:text-properties style:text-position="0% 100%" style:font-name="Liberation Serif1" officeooo:rsid="0014a716"/>
    </style:style>
    <style:style style:name="T26" style:family="text">
      <style:text-properties style:text-position="0% 100%" style:font-name="Liberation Serif1" officeooo:rsid="0014a716" style:font-name-asian="NSimSun" style:font-name-complex="Lucida Sans1"/>
    </style:style>
    <style:style style:name="T27" style:family="text">
      <style:text-properties style:text-position="0% 100%" style:font-name="Liberation Serif1" officeooo:rsid="0012ab40" style:font-name-asian="NSimSun" style:font-name-complex="Lucida Sans1"/>
    </style:style>
    <style:style style:name="T28" style:family="text">
      <style:text-properties style:text-position="0% 100%" style:font-name="Liberation Serif1" officeooo:rsid="0010ad9b" style:font-name-asian="NSimSun" style:font-name-complex="Lucida Sans1"/>
    </style:style>
    <style:style style:name="T29" style:family="text">
      <style:text-properties style:text-position="0% 100%" style:font-name="Liberation Serif1" officeooo:rsid="0015598b" style:font-name-asian="NSimSun" style:font-name-complex="Lucida Sans1"/>
    </style:style>
    <style:style style:name="T30" style:family="text">
      <style:text-properties style:text-position="0% 100%" style:font-name="Liberation Serif1" officeooo:rsid="001755ab" style:font-name-asian="NSimSun" style:font-name-complex="Lucida Sans1"/>
    </style:style>
    <style:style style:name="T31" style:family="text">
      <style:text-properties style:text-position="0% 100%" style:font-name="Liberation Serif1" officeooo:rsid="0018fc2b" style:font-name-asian="NSimSun" style:font-name-complex="Lucida Sans1"/>
    </style:style>
    <style:style style:name="T32" style:family="text">
      <style:text-properties style:text-position="0% 100%" style:font-name="Liberation Serif1" officeooo:rsid="0019885b" style:font-name-asian="NSimSun" style:font-name-complex="Lucida San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Le nom des services ayant plus de 100 lits</text:p>
      <text:p text:style-name="P1"/>
      <text:p text:style-name="P1"><text:span text:style-name="T1">π</text:span><text:span text:style-name="T2">[</text:span><text:span text:style-name="T8">nom_serv</text:span><text:span text:style-name="T2">]</text:span><text:span text:style-name="T23">(</text:span><text:span text:style-name="T14">σ</text:span><text:span text:style-name="T8">[nb_lits &gt; 100]</text:span><text:span text:style-name="T13"> </text:span><text:span text:style-name="T15">(</text:span><text:span text:style-name="T22">t_s204_service</text:span><text:span text:style-name="T23">)</text:span><text:span text:style-name="T24">)</text:span></text:p>
      <text:p text:style-name="P1"><text:span text:style-name="T24"/></text:p>
      <text:p text:style-name="P1"><text:span text:style-name="T24">2. Noms des hôpitaux qui ont un service de Cardiologie.</text:span></text:p>
      <text:p text:style-name="P2"><text:span text:style-name="T15">π</text:span><text:span text:style-name="T2">[</text:span><text:span text:style-name="T8">nom_</text:span><text:span text:style-name="T9">hop</text:span><text:span text:style-name="T2">]</text:span><text:span text:style-name="T23">(</text:span><text:span text:style-name="T14">σ</text:span><text:span text:style-name="T8">[n</text:span><text:span text:style-name="T9">om_serv =</text:span><text:span text:style-name="T8"> ‘</text:span><text:span text:style-name="T9">Cardiologie’</text:span><text:span text:style-name="T8">]</text:span><text:span text:style-name="T13"> </text:span><text:span text:style-name="T15">(</text:span><text:span text:style-name="T22">t_s204_service</text:span><text:span text:style-name="T23">) </text:span><text:span text:style-name="T16">∞</text:span><text:span text:style-name="T26"> </text:span><text:span text:style-name="T19">π</text:span><text:span text:style-name="T10">[</text:span><text:span text:style-name="T11">id_hop, nom_hop </text:span><text:span text:style-name="T10">]</text:span><text:span text:style-name="T26">(t_s204_hopital)</text:span><text:span text:style-name="T24">)</text:span></text:p>
      <text:p text:style-name="P2"><text:span text:style-name="T24"/></text:p>
      <text:p text:style-name="P2"><text:span text:style-name="T24">3. Les noms des laboratoires de l’hôpital Jacques Monod.</text:span></text:p>
      <text:p text:style-name="P2"><text:span text:style-name="T24"/></text:p>
      <text:p text:style-name="P2"><text:span text:style-name="T15">π</text:span><text:span text:style-name="T2">[</text:span><text:span text:style-name="T8">nom_</text:span><text:span text:style-name="T9">lab</text:span><text:span text:style-name="T2">]</text:span><text:span text:style-name="T23">(</text:span><text:span text:style-name="T14">σ</text:span><text:span text:style-name="T8">[n</text:span><text:span text:style-name="T9">om_hop =</text:span><text:span text:style-name="T8"> ‘</text:span><text:span text:style-name="T3">Jacques Monod</text:span><text:span text:style-name="T9">’</text:span><text:span text:style-name="T8">]</text:span><text:span text:style-name="T13"> </text:span><text:span text:style-name="T15">(</text:span><text:span text:style-name="T22">t_s204_</text:span><text:span text:style-name="T25">hopital</text:span><text:span text:style-name="T23">) </text:span><text:span text:style-name="T16">∞</text:span><text:span text:style-name="T26"> (t_s204_laboratoire))</text:span></text:p>
      <text:p text:style-name="P2"><text:span text:style-name="T26"/></text:p>
      <text:p text:style-name="P2"><text:span text:style-name="T26">4. Noms des patients ayant consulté un gynécologue</text:span></text:p>
      <text:p text:style-name="P2"><text:span text:style-name="T26"/></text:p>
      <text:p text:style-name="P3"><text:span text:style-name="T20">π</text:span><text:span text:style-name="T4">[</text:span><text:span text:style-name="T10">nom_</text:span><text:span text:style-name="T12">pat</text:span><text:span text:style-name="T4">]</text:span><text:span text:style-name="T27">(</text:span><text:span text:style-name="T18">σ</text:span><text:span text:style-name="T10">[</text:span><text:span text:style-name="T12">spec</text:span><text:span text:style-name="T11"> =</text:span><text:span text:style-name="T10"> ‘</text:span><text:span text:style-name="T6">gynécologue</text:span><text:span text:style-name="T11">’</text:span><text:span text:style-name="T10">]</text:span><text:span text:style-name="T21"> </text:span><text:span text:style-name="T20">(</text:span><text:span text:style-name="T28">t_s204_</text:span><text:span text:style-name="T29">medecin</text:span><text:span text:style-name="T27">) </text:span><text:span text:style-name="T16">∞</text:span><text:span text:style-name="T26"> (t_s204_</text:span><text:span text:style-name="T29">consulte</text:span><text:span text:style-name="T26">) </text:span><text:span text:style-name="T17">∞ </text:span><text:span text:style-name="T26"><text:s/>(t_s204_</text:span><text:span text:style-name="T29">patient)</text:span><text:span text:style-name="T26">)</text:span></text:p>
      <text:p text:style-name="P3"><text:span text:style-name="T26"/></text:p>
      <text:p text:style-name="P3"><text:span text:style-name="T26">5. Liste des consultations de médecins (nom du médecin, nom du patient et la date de consultation)</text:span></text:p>
      <text:p text:style-name="P3"><text:span text:style-name="T26"/></text:p>
      <text:p text:style-name="P3"><text:span text:style-name="T20">π</text:span><text:span text:style-name="T4">[</text:span><text:span text:style-name="T6">nom_med, </text:span><text:span text:style-name="T10">nom_</text:span><text:span text:style-name="T12">pat, date_consult</text:span><text:span text:style-name="T4">]</text:span><text:span text:style-name="T27">(</text:span><text:span text:style-name="T21"> </text:span><text:span text:style-name="T20">(</text:span><text:span text:style-name="T28">t_s204_</text:span><text:span text:style-name="T29">medecin</text:span><text:span text:style-name="T27">) </text:span><text:span text:style-name="T16">∞</text:span><text:span text:style-name="T26"> (t_s204_</text:span><text:span text:style-name="T29">consulte</text:span><text:span text:style-name="T26">) </text:span><text:span text:style-name="T17">∞ </text:span><text:span text:style-name="T26"><text:s/>(t_s204_</text:span><text:span text:style-name="T29">patient)</text:span><text:span text:style-name="T26">)</text:span></text:p>
      <text:p text:style-name="P3"><text:span text:style-name="T26"/></text:p>
      <text:p text:style-name="P3"><text:span text:style-name="T26">6. Noms des patients ayant consulté un médecin consultant indépendant à l'hôpital Jacques Monod.</text:span></text:p>
      <text:p text:style-name="P3"><text:span text:style-name="T26"/></text:p>
      <text:p text:style-name="P4"><text:span text:style-name="T20">π</text:span><text:span text:style-name="T4">[</text:span><text:span text:style-name="T10">nom_</text:span><text:span text:style-name="T12">pat</text:span><text:span text:style-name="T4">]</text:span><text:span text:style-name="T27">(</text:span><text:span text:style-name="T18">σ</text:span><text:span text:style-name="T10">[</text:span><text:span text:style-name="T12">fct</text:span><text:span text:style-name="T11"> =</text:span><text:span text:style-name="T10"> ‘</text:span><text:span text:style-name="T7">Consultant</text:span><text:span text:style-name="T11">’</text:span><text:span text:style-name="T10">]</text:span><text:span text:style-name="T21"> </text:span><text:span text:style-name="T20">(</text:span><text:span text:style-name="T28">t_s204_</text:span><text:span text:style-name="T29">medecin</text:span><text:span text:style-name="T27">) </text:span><text:span text:style-name="T16">∞ </text:span><text:span text:style-name="T18">σ</text:span><text:span text:style-name="T10">[n</text:span><text:span text:style-name="T11">om_hop =</text:span><text:span text:style-name="T10"> ‘</text:span><text:span text:style-name="T5">Jacques Monod</text:span><text:span text:style-name="T11">’</text:span><text:span text:style-name="T10">]</text:span><text:span text:style-name="T21"> </text:span><text:span text:style-name="T26">(t_s204_</text:span><text:span text:style-name="T30">hopital</text:span><text:span text:style-name="T26">) </text:span><text:span text:style-name="T17">∞</text:span><text:span text:style-name="T26"> (t_s204_</text:span><text:span text:style-name="T29">consulte</text:span><text:span text:style-name="T26">) </text:span><text:span text:style-name="T17">∞ </text:span><text:span text:style-name="T26"><text:s/>(t_s204_</text:span><text:span text:style-name="T29">patient) </text:span><text:span text:style-name="T26">)</text:span></text:p>
      <text:p text:style-name="P4"><text:span text:style-name="T26"/></text:p>
      <text:p text:style-name="P5"><text:span text:style-name="T26">7. Noms des patients n'ayant consulté qu'à l'hôpital Jacques Monod.</text:span></text:p>
      <text:p text:style-name="P5"><text:span text:style-name="T26"/></text:p>
      <text:p text:style-name="P6"><text:span text:style-name="T26"><text:s/></text:span><text:span text:style-name="T20">π</text:span><text:span text:style-name="T4">[</text:span><text:span text:style-name="T10">nom_</text:span><text:span text:style-name="T12">pat</text:span><text:span text:style-name="T4">]</text:span><text:span text:style-name="T26"> (t_s204_</text:span><text:span text:style-name="T29">patient) <text:s/>/</text:span><text:span text:style-name="T31"> </text:span><text:span text:style-name="T20">π</text:span><text:span text:style-name="T4">[</text:span><text:span text:style-name="T10">nom_</text:span><text:span text:style-name="T12">pat</text:span><text:span text:style-name="T4">]</text:span><text:span text:style-name="T26"> </text:span><text:span text:style-name="T31">(</text:span><text:span text:style-name="T16"> </text:span><text:span text:style-name="T18">σ</text:span><text:span text:style-name="T10">[n</text:span><text:span text:style-name="T11">om_hop =</text:span><text:span text:style-name="T10"> ‘</text:span><text:span text:style-name="T5">Jacques Monod</text:span><text:span text:style-name="T11">’</text:span><text:span text:style-name="T10">]</text:span><text:span text:style-name="T21"> </text:span><text:span text:style-name="T26">(t_s204_</text:span><text:span text:style-name="T32">hopital</text:span><text:span text:style-name="T29">)</text:span><text:span text:style-name="T17">∞</text:span><text:span text:style-name="T26"> </text:span><text:span text:style-name="T20">(</text:span><text:span text:style-name="T28">t_s204_</text:span><text:span text:style-name="T29">medecin</text:span><text:span text:style-name="T27">)</text:span><text:span text:style-name="T17">∞</text:span><text:span text:style-name="T26"> (t_s204_</text:span><text:span text:style-name="T29">consulte</text:span><text:span text:style-name="T26">) </text:span><text:span text:style-name="T17">∞ </text:span><text:span text:style-name="T26"><text:s/>(t_s204_</text:span><text:span text:style-name="T29">patient) </text:span><text:span text:style-name="T31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05T08:44:59.071000000</meta:creation-date>
    <dc:date>2026-05-05T09:35:13.569000000</dc:date>
    <meta:editing-duration>PT28M49S</meta:editing-duration>
    <meta:editing-cycles>7</meta:editing-cycles>
    <meta:generator>LibreOffice/24.2.7.2$Windows_X86_64 LibreOffice_project/ee3885777aa7032db5a9b65deec9457448a91162</meta:generator>
    <meta:document-statistic meta:table-count="0" meta:image-count="0" meta:object-count="0" meta:page-count="1" meta:paragraph-count="14" meta:word-count="143" meta:character-count="1159" meta:non-whitespace-character-count="1024"/>
  </office:meta>
</office:document-meta>
</file>