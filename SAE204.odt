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58db" officeooo:paragraph-rsid="001058db"/>
    </style:style>
    <style:style style:name="P2" style:family="paragraph" style:parent-style-name="Standard">
      <style:text-properties style:text-position="0% 100%" style:font-name="Liberation Serif" officeooo:rsid="0013c5e5" officeooo:paragraph-rsid="001058db"/>
    </style:style>
    <style:style style:name="P3" style:family="paragraph" style:parent-style-name="Standard">
      <style:text-properties officeooo:rsid="001058db" officeooo:paragraph-rsid="001ea48e"/>
    </style:style>
    <style:style style:name="P4" style:family="paragraph" style:parent-style-name="Standard">
      <style:text-properties officeooo:rsid="001058db" officeooo:paragraph-rsid="0014a716"/>
    </style:style>
    <style:style style:name="P5" style:family="paragraph" style:parent-style-name="Standard">
      <style:text-properties style:text-position="0% 100%" style:font-name="Liberation Serif" officeooo:rsid="0013c5e5" officeooo:paragraph-rsid="0014a716"/>
    </style:style>
    <style:style style:name="P6" style:family="paragraph" style:parent-style-name="Standard">
      <style:text-properties officeooo:rsid="001058db" officeooo:paragraph-rsid="001ce3e1"/>
    </style:style>
    <style:style style:name="P7" style:family="paragraph" style:parent-style-name="Standard">
      <style:text-properties style:text-position="0% 100%" style:font-name="Liberation Serif" officeooo:rsid="0014a716" officeooo:paragraph-rsid="0014a716" style:font-name-asian="NSimSun" style:font-name-complex="Lucida Sans1"/>
    </style:style>
    <style:style style:name="P8" style:family="paragraph" style:parent-style-name="Standard">
      <style:text-properties officeooo:rsid="001058db" officeooo:paragraph-rsid="0022d83c"/>
    </style:style>
    <style:style style:name="P9" style:family="paragraph" style:parent-style-name="Standard">
      <style:text-properties officeooo:rsid="001058db" officeooo:paragraph-rsid="0015598b"/>
    </style:style>
    <style:style style:name="P10" style:family="paragraph" style:parent-style-name="Standard">
      <style:text-properties style:text-position="0% 100%" style:font-name="Liberation Serif" officeooo:rsid="0014a716" officeooo:paragraph-rsid="0015598b" style:font-name-asian="NSimSun" style:font-name-complex="Lucida Sans1"/>
    </style:style>
    <style:style style:name="P11" style:family="paragraph" style:parent-style-name="Standard">
      <style:text-properties officeooo:rsid="001058db" officeooo:paragraph-rsid="0022f4e3"/>
    </style:style>
    <style:style style:name="P12" style:family="paragraph" style:parent-style-name="Standard">
      <style:text-properties officeooo:rsid="001058db" officeooo:paragraph-rsid="00267167"/>
    </style:style>
    <style:style style:name="P13" style:family="paragraph" style:parent-style-name="Standard">
      <style:text-properties officeooo:rsid="001058db" officeooo:paragraph-rsid="001755ab"/>
    </style:style>
    <style:style style:name="P14" style:family="paragraph" style:parent-style-name="Standard">
      <style:text-properties style:text-position="0% 100%" style:font-name="Liberation Serif" officeooo:rsid="0014a716" officeooo:paragraph-rsid="0018fc2b" style:font-name-asian="NSimSun" style:font-name-complex="Lucida Sans1"/>
    </style:style>
    <style:style style:name="P15" style:family="paragraph" style:parent-style-name="Standard">
      <style:text-properties officeooo:rsid="001058db" officeooo:paragraph-rsid="0018fc2b"/>
    </style:style>
    <style:style style:name="P16" style:family="paragraph" style:parent-style-name="Standard">
      <style:text-properties style:text-position="0% 100%" style:font-name="Arial" fo:font-size="10pt" officeooo:rsid="0018fc2b" officeooo:paragraph-rsid="002e9d8b" style:font-name-asian="NSimSun" style:font-size-asian="10pt" style:font-name-complex="Lucida Sans1" style:font-size-complex="10pt"/>
    </style:style>
    <style:style style:name="T1" style:family="text">
      <style:text-properties fo:font-family="'Liberation Serif'" style:font-family-generic="roman"/>
    </style:style>
    <style:style style:name="T2" style:family="text">
      <style:text-properties style:text-position="sub 58%" style:font-name="Liberation Serif" officeooo:rsid="0010ad9b"/>
    </style:style>
    <style:style style:name="T3" style:family="text">
      <style:text-properties style:text-position="sub 58%" fo:font-family="'Liberation Serif'" style:font-family-generic="roman" officeooo:rsid="0012ab40"/>
    </style:style>
    <style:style style:name="T4" style:family="text">
      <style:text-properties style:text-position="0% 100%" style:font-name="Liberation Serif" officeooo:rsid="0012ab40"/>
    </style:style>
    <style:style style:name="T5" style:family="text">
      <style:text-properties style:text-position="0% 100%" fo:font-family="'Liberation Serif'" style:font-family-generic="roman" officeooo:rsid="0012ab40"/>
    </style:style>
    <style:style style:name="T6" style:family="text">
      <style:text-properties style:text-position="0% 100%" fo:font-family="'Liberation Serif'" style:font-family-generic="roman" officeooo:rsid="0010ad9b"/>
    </style:style>
    <style:style style:name="T7" style:family="text">
      <style:text-properties style:text-position="0% 100%" fo:font-family="'Liberation Serif'" style:font-family-generic="roman" officeooo:rsid="0013c5e5"/>
    </style:style>
    <style:style style:name="T8" style:family="text">
      <style:text-properties style:text-position="0% 100%" style:font-name="Liberation Serif" officeooo:rsid="0010ad9b"/>
    </style:style>
    <style:style style:name="T9" style:family="text">
      <style:text-properties style:text-position="0% 100%" style:font-name="Liberation Serif" officeooo:rsid="0013c5e5"/>
    </style:style>
    <style:style style:name="T10" style:family="text">
      <style:text-properties style:text-position="sub 58%" fo:font-family="'Liberation Serif'" style:font-family-generic="roman" officeooo:rsid="0014a716"/>
    </style:style>
    <style:style style:name="T11" style:family="text">
      <style:text-properties style:text-position="0% 100%" fo:font-family="'Liberation Serif'" style:font-family-generic="roman" officeooo:rsid="0014a716" style:font-name-asian="NSimSun" style:font-name-complex="Lucida Sans1"/>
    </style:style>
    <style:style style:name="T12" style:family="text">
      <style:text-properties style:text-position="sub 58%" fo:font-family="'Liberation Serif'" style:font-family-generic="roman" officeooo:rsid="001f9df2" style:font-name-asian="NSimSun" style:font-name-complex="Lucida Sans1"/>
    </style:style>
    <style:style style:name="T13" style:family="text">
      <style:text-properties style:text-position="sub 58%" fo:font-family="'Liberation Serif'" style:font-family-generic="roman" officeooo:rsid="001ea48e" style:font-name-asian="NSimSun" style:font-name-complex="Lucida Sans1"/>
    </style:style>
    <style:style style:name="T14" style:family="text">
      <style:text-properties style:text-position="0% 100%" fo:font-family="'Liberation Serif'" style:font-family-generic="roman" officeooo:rsid="001ea48e" style:font-name-asian="NSimSun" style:font-name-complex="Lucida Sans1"/>
    </style:style>
    <style:style style:name="T15" style:family="text">
      <style:text-properties style:text-position="0% 100%" style:font-name="Liberation Serif" officeooo:rsid="001ea48e"/>
    </style:style>
    <style:style style:name="T16" style:family="text">
      <style:text-properties style:text-position="0% 100%" fo:font-family="'Liberation Serif'" style:font-family-generic="roman" officeooo:rsid="0014a716" style:font-family-asian="'Liberation Serif'" style:font-family-generic-asian="roman" style:font-family-complex="'Liberation Serif'" style:font-family-generic-complex="roman"/>
    </style:style>
    <style:style style:name="T17" style:family="text">
      <style:text-properties style:text-position="0% 100%" style:font-name="Liberation Serif" officeooo:rsid="0014a716" style:font-name-asian="NSimSun" style:font-name-complex="Lucida Sans1"/>
    </style:style>
    <style:style style:name="T18" style:family="text">
      <style:text-properties style:text-position="sub 58%" fo:font-family="'Liberation Serif'" style:font-family-generic="roman" officeooo:rsid="0012ab40" style:font-name-asian="NSimSun" style:font-name-complex="Lucida Sans1"/>
    </style:style>
    <style:style style:name="T19" style:family="text">
      <style:text-properties style:text-position="sub 58%" fo:font-family="'Liberation Serif'" style:font-family-generic="roman" officeooo:rsid="0014a716" style:font-name-asian="NSimSun" style:font-name-complex="Lucida Sans1"/>
    </style:style>
    <style:style style:name="T20" style:family="text">
      <style:text-properties style:text-position="0% 100%" style:font-name="Liberation Serif" officeooo:rsid="001ce3e1"/>
    </style:style>
    <style:style style:name="T21" style:family="text">
      <style:text-properties style:text-position="sub 58%" fo:font-family="'Liberation Serif'" style:font-family-generic="roman" officeooo:rsid="001ce3e1"/>
    </style:style>
    <style:style style:name="T22" style:family="text">
      <style:text-properties style:text-position="sub 58%" style:font-name="Liberation Serif" officeooo:rsid="0013c5e5"/>
    </style:style>
    <style:style style:name="T23" style:family="text">
      <style:text-properties style:text-position="0% 100%" style:font-name="Liberation Serif" officeooo:rsid="0014a716"/>
    </style:style>
    <style:style style:name="T24" style:family="text">
      <style:text-properties style:text-position="0% 100%" fo:font-family="'Liberation Serif'" style:font-family-generic="roman" officeooo:rsid="0013c5e5" style:font-name-asian="NSimSun" style:font-name-complex="Lucida Sans1"/>
    </style:style>
    <style:style style:name="T25" style:family="text">
      <style:text-properties style:text-position="sub 58%" fo:font-family="'Liberation Serif'" style:font-family-generic="roman" officeooo:rsid="001ce3e1" style:font-name-asian="NSimSun" style:font-name-complex="Lucida Sans1"/>
    </style:style>
    <style:style style:name="T26" style:family="text">
      <style:text-properties style:text-position="sub 58%" style:font-name="Liberation Serif" officeooo:rsid="0010ad9b" style:font-name-asian="NSimSun" style:font-name-complex="Lucida Sans1"/>
    </style:style>
    <style:style style:name="T27" style:family="text">
      <style:text-properties style:text-position="sub 58%" fo:font-family="'Liberation Serif'" style:font-family-generic="roman" officeooo:rsid="0015598b" style:font-name-asian="NSimSun" style:font-name-complex="Lucida Sans1"/>
    </style:style>
    <style:style style:name="T28" style:family="text">
      <style:text-properties style:text-position="0% 100%" style:font-name="Liberation Serif" officeooo:rsid="0012ab40" style:font-name-asian="NSimSun" style:font-name-complex="Lucida Sans1"/>
    </style:style>
    <style:style style:name="T29" style:family="text">
      <style:text-properties style:text-position="0% 100%" style:font-name="Liberation Serif" officeooo:rsid="001f9df2" style:font-name-asian="NSimSun" style:font-name-complex="Lucida Sans1"/>
    </style:style>
    <style:style style:name="T30" style:family="text">
      <style:text-properties style:text-position="0% 100%" fo:font-family="'Liberation Serif'" style:font-family-generic="roman" officeooo:rsid="0012ab40" style:font-name-asian="NSimSun" style:font-name-complex="Lucida Sans1"/>
    </style:style>
    <style:style style:name="T31" style:family="text">
      <style:text-properties style:text-position="sub 58%" style:font-name="Liberation Serif" officeooo:rsid="0015598b" style:font-name-asian="NSimSun" style:font-name-complex="Lucida Sans1"/>
    </style:style>
    <style:style style:name="T32" style:family="text">
      <style:text-properties style:text-position="0% 100%" fo:font-family="'Liberation Serif'" style:font-family-generic="roman" officeooo:rsid="0010ad9b" style:font-name-asian="NSimSun" style:font-name-complex="Lucida Sans1"/>
    </style:style>
    <style:style style:name="T33" style:family="text">
      <style:text-properties style:text-position="0% 100%" style:font-name="Liberation Serif" officeooo:rsid="0010ad9b" style:font-name-asian="NSimSun" style:font-name-complex="Lucida Sans1"/>
    </style:style>
    <style:style style:name="T34" style:family="text">
      <style:text-properties style:text-position="0% 100%" style:font-name="Liberation Serif" officeooo:rsid="0015598b" style:font-name-asian="NSimSun" style:font-name-complex="Lucida Sans1"/>
    </style:style>
    <style:style style:name="T35" style:family="text">
      <style:text-properties style:text-position="sub 58%" fo:font-family="'Liberation Serif'" style:font-family-generic="roman" officeooo:rsid="001fa58b" style:font-name-asian="NSimSun" style:font-name-complex="Lucida Sans1"/>
    </style:style>
    <style:style style:name="T36" style:family="text">
      <style:text-properties style:text-position="0% 100%" fo:font-family="'Liberation Serif'" style:font-family-generic="roman" officeooo:rsid="0015598b" style:font-family-asian="'Liberation Serif'" style:font-family-generic-asian="roman" style:font-family-complex="'Liberation Serif'" style:font-family-generic-complex="roman"/>
    </style:style>
    <style:style style:name="T37" style:family="text">
      <style:text-properties style:text-position="sub 58%" style:font-name="Liberation Serif" officeooo:rsid="0022d83c" style:font-name-asian="NSimSun" style:font-name-complex="Lucida Sans1"/>
    </style:style>
    <style:style style:name="T38" style:family="text">
      <style:text-properties style:text-position="sub 58%" fo:font-family="'Liberation Serif'" style:font-family-generic="roman" officeooo:rsid="0022f4e3" style:font-name-asian="NSimSun" style:font-name-complex="Lucida Sans1"/>
    </style:style>
    <style:style style:name="T39" style:family="text">
      <style:text-properties style:text-position="sub 58%" fo:font-family="'Liberation Serif'" style:font-family-generic="roman" officeooo:rsid="00247e4a" style:font-name-asian="NSimSun" style:font-name-complex="Lucida Sans1"/>
    </style:style>
    <style:style style:name="T40" style:family="text">
      <style:text-properties style:text-position="sub 58%" style:font-name="Liberation Serif" officeooo:rsid="00231f74" style:font-name-asian="NSimSun" style:font-name-complex="Lucida Sans1"/>
    </style:style>
    <style:style style:name="T41" style:family="text">
      <style:text-properties style:text-position="sub 58%" fo:font-family="'Liberation Serif'" style:font-family-generic="roman" officeooo:rsid="00267167" style:font-name-asian="NSimSun" style:font-name-complex="Lucida Sans1"/>
    </style:style>
    <style:style style:name="T42" style:family="text">
      <style:text-properties style:text-position="0% 100%" style:font-name="Liberation Serif" officeooo:rsid="00267167" style:font-name-asian="NSimSun" style:font-name-complex="Lucida Sans1"/>
    </style:style>
    <style:style style:name="T43" style:family="text">
      <style:text-properties style:text-position="sub 58%" style:font-name="Liberation Serif" officeooo:rsid="002d3507" style:font-name-asian="NSimSun" style:font-name-complex="Lucida Sans1"/>
    </style:style>
    <style:style style:name="T44" style:family="text">
      <style:text-properties style:text-position="sub 58%" style:font-name="Liberation Serif" officeooo:rsid="0013c5e5" style:font-name-asian="NSimSun" style:font-name-complex="Lucida Sans1"/>
    </style:style>
    <style:style style:name="T45" style:family="text">
      <style:text-properties style:text-position="0% 100%" style:font-name="Liberation Serif" officeooo:rsid="001755ab" style:font-name-asian="NSimSun" style:font-name-complex="Lucida Sans1"/>
    </style:style>
    <style:style style:name="T46" style:family="text">
      <style:text-properties style:text-position="sub 58%" fo:font-family="'Liberation Serif'" style:font-family-generic="roman" officeooo:rsid="002d3507" style:font-name-asian="NSimSun" style:font-name-complex="Lucida Sans1"/>
    </style:style>
    <style:style style:name="T47" style:family="text">
      <style:text-properties style:text-position="sub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- Le nom des services ayant plus de 100 lits</text:p>
      <text:p text:style-name="P1"/>
      <text:p text:style-name="P1"><text:span text:style-name="T1">π</text:span><text:span text:style-name="T2">[</text:span><text:span text:style-name="T3">nom_serv</text:span><text:span text:style-name="T2">]</text:span><text:span text:style-name="T4">(</text:span><text:span text:style-name="T5">σ</text:span><text:span text:style-name="T3">[nb_lits &gt; 100]</text:span><text:span text:style-name="T6"> </text:span><text:span text:style-name="T7">(</text:span><text:span text:style-name="T8">t_s204_service</text:span><text:span text:style-name="T4">)</text:span><text:span text:style-name="T9">)</text:span></text:p>
      <text:p text:style-name="P1"><text:span text:style-name="T9"/></text:p>
      <text:p text:style-name="P2">2. Noms des hôpitaux qui ont un service de Cardiologie.</text:p>
      <text:p text:style-name="P3"><text:span text:style-name="T7">π</text:span><text:span text:style-name="T2">[</text:span><text:span text:style-name="T3">nom_</text:span><text:span text:style-name="T10">hop</text:span><text:span text:style-name="T2">]</text:span><text:span text:style-name="T4">(</text:span><text:span text:style-name="T11">π</text:span><text:span text:style-name="T12">[</text:span><text:span text:style-name="T13">nom_serv,idHop</text:span><text:span text:style-name="T12">]</text:span><text:span text:style-name="T14">(</text:span><text:span text:style-name="T5">σ</text:span><text:span text:style-name="T3">[n</text:span><text:span text:style-name="T10">om_serv =</text:span><text:span text:style-name="T3"> ‘</text:span><text:span text:style-name="T10">Cardiologie’</text:span><text:span text:style-name="T3">]</text:span><text:span text:style-name="T7">(</text:span><text:span text:style-name="T8">t_s204_service</text:span><text:span text:style-name="T4">)</text:span><text:span text:style-name="T15">)</text:span><text:span text:style-name="T4"> </text:span><text:span text:style-name="T16">∞</text:span><text:span text:style-name="T17"> </text:span><text:span text:style-name="T11">π</text:span><text:span text:style-name="T18">[</text:span><text:span text:style-name="T19">id</text:span><text:span text:style-name="T13">H</text:span><text:span text:style-name="T19">op, nom_hop</text:span><text:span text:style-name="T18">]</text:span><text:span text:style-name="T17">(t_s204_hopital)</text:span><text:span text:style-name="T9">)</text:span></text:p>
      <text:p text:style-name="P4"><text:span text:style-name="T9"/></text:p>
      <text:p text:style-name="P5">3. Les noms des laboratoires de l’hôpital Jacques Monod.</text:p>
      <text:p text:style-name="P4"><text:span text:style-name="T9"/></text:p>
      <text:p text:style-name="P6"><text:span text:style-name="T7">π</text:span><text:span text:style-name="T2">[</text:span><text:span text:style-name="T3">nom_</text:span><text:span text:style-name="T10">lab</text:span><text:span text:style-name="T2">]</text:span><text:span text:style-name="T4">(</text:span><text:span text:style-name="T20">(</text:span><text:span text:style-name="T7">π</text:span><text:span text:style-name="T21">[nom_hop,idhop]</text:span><text:span text:style-name="T20">(</text:span><text:span text:style-name="T5">σ</text:span><text:span text:style-name="T3">[n</text:span><text:span text:style-name="T10">om_hop =</text:span><text:span text:style-name="T3"> ‘</text:span><text:span text:style-name="T22">Jacques Monod</text:span><text:span text:style-name="T10">’</text:span><text:span text:style-name="T3">]</text:span><text:span text:style-name="T20">)</text:span><text:span text:style-name="T7">(</text:span><text:span text:style-name="T8">t_s204_</text:span><text:span text:style-name="T23">hopital</text:span><text:span text:style-name="T4">)</text:span><text:span text:style-name="T20">)</text:span><text:span text:style-name="T4"> </text:span><text:span text:style-name="T16">∞</text:span><text:span text:style-name="T17"> </text:span><text:span text:style-name="T24">π</text:span><text:span text:style-name="T25">[nom_lab,idhop]</text:span><text:span text:style-name="T17">(t_s204_laboratoire))</text:span></text:p>
      <text:p text:style-name="P4"><text:span text:style-name="T17"/></text:p>
      <text:p text:style-name="P7">4. Noms des patients ayant consulté un gynécologue</text:p>
      <text:p text:style-name="P4"><text:span text:style-name="T17"/></text:p>
      <text:p text:style-name="P8"><text:span text:style-name="T24">π</text:span><text:span text:style-name="T26">[</text:span><text:span text:style-name="T18">nom_</text:span><text:span text:style-name="T27">pat</text:span><text:span text:style-name="T26">]</text:span><text:span text:style-name="T28">(</text:span><text:span text:style-name="T24">π</text:span><text:span text:style-name="T26">[</text:span><text:span text:style-name="T12">spec,idMed</text:span><text:span text:style-name="T26">]</text:span><text:span text:style-name="T29">(</text:span><text:span text:style-name="T30">σ</text:span><text:span text:style-name="T18">[</text:span><text:span text:style-name="T27">spec</text:span><text:span text:style-name="T19"> =</text:span><text:span text:style-name="T18"> ‘</text:span><text:span text:style-name="T31">gynécologue</text:span><text:span text:style-name="T19">’</text:span><text:span text:style-name="T18">]</text:span><text:span text:style-name="T32"> </text:span><text:span text:style-name="T24">(</text:span><text:span text:style-name="T33">t_s204_</text:span><text:span text:style-name="T34">medecin</text:span><text:span text:style-name="T28">)</text:span><text:span text:style-name="T29">)</text:span><text:span text:style-name="T28"> </text:span><text:span text:style-name="T16">∞</text:span><text:span text:style-name="T17"> </text:span><text:span text:style-name="T24">π</text:span><text:span text:style-name="T26">[</text:span><text:span text:style-name="T35">idMed,idPat</text:span><text:span text:style-name="T26">]</text:span><text:span text:style-name="T17">(t_s204_</text:span><text:span text:style-name="T34">consulte</text:span><text:span text:style-name="T17">) </text:span><text:span text:style-name="T36">∞ </text:span><text:span text:style-name="T17"><text:s/></text:span><text:span text:style-name="T24">π</text:span><text:span text:style-name="T26">[</text:span><text:span text:style-name="T18">nom_</text:span><text:span text:style-name="T27">pat</text:span><text:span text:style-name="T37">,idPat]</text:span><text:span text:style-name="T17">(t_s204_</text:span><text:span text:style-name="T34">patient)</text:span><text:span text:style-name="T17">)</text:span></text:p>
      <text:p text:style-name="P9"><text:span text:style-name="T17"/></text:p>
      <text:p text:style-name="P10">5. Liste des consultations de médecins (nom du médecin, nom du patient et la date de consultation)</text:p>
      <text:p text:style-name="P9"><text:span text:style-name="T17"/></text:p>
      <text:p text:style-name="P11"><text:span text:style-name="T24">π</text:span><text:span text:style-name="T26">[</text:span><text:span text:style-name="T31">nom_med, </text:span><text:span text:style-name="T18">nom_</text:span><text:span text:style-name="T27">pat, date_consult</text:span><text:span text:style-name="T26">]</text:span><text:span text:style-name="T28">(</text:span><text:span text:style-name="T32"> </text:span><text:span text:style-name="T24">π</text:span><text:span text:style-name="T26">[</text:span><text:span text:style-name="T38">idMed,nom_med</text:span><text:span text:style-name="T26">]</text:span><text:span text:style-name="T24">(</text:span><text:span text:style-name="T33">t_s204_</text:span><text:span text:style-name="T34">medecin</text:span><text:span text:style-name="T28">) </text:span><text:span text:style-name="T16">∞</text:span><text:span text:style-name="T17"> (t_s204_</text:span><text:span text:style-name="T34">consulte</text:span><text:span text:style-name="T17">) </text:span><text:span text:style-name="T36">∞ </text:span><text:span text:style-name="T17"><text:s/></text:span><text:span text:style-name="T24">π</text:span><text:span text:style-name="T26">[</text:span><text:span text:style-name="T38">idPat,</text:span><text:span text:style-name="T39">nom_pat</text:span><text:span text:style-name="T40">]</text:span><text:span text:style-name="T17">(t_s204_</text:span><text:span text:style-name="T34">patient)</text:span><text:span text:style-name="T17">)</text:span></text:p>
      <text:p text:style-name="P9"><text:span text:style-name="T17"/></text:p>
      <text:p text:style-name="P10">6. Noms des patients ayant consulté un médecin consultant indépendant à l'hôpital Jacques Monod.</text:p>
      <text:p text:style-name="P9"><text:span text:style-name="T17"/></text:p>
      <text:p text:style-name="P12"><text:span text:style-name="T24">π</text:span><text:span text:style-name="T26">[</text:span><text:span text:style-name="T18">nom_</text:span><text:span text:style-name="T27">pat</text:span><text:span text:style-name="T26">]</text:span><text:span text:style-name="T28">(</text:span><text:span text:style-name="T24">π</text:span><text:span text:style-name="T26">[</text:span><text:span text:style-name="T41">idMed,fct</text:span><text:span text:style-name="T26">]</text:span><text:span text:style-name="T42">(</text:span><text:span text:style-name="T30">σ</text:span><text:span text:style-name="T18">[</text:span><text:span text:style-name="T27">fct</text:span><text:span text:style-name="T19"> =</text:span><text:span text:style-name="T18"> ‘</text:span><text:span text:style-name="T43">CONSULTANT</text:span><text:span text:style-name="T19">’</text:span><text:span text:style-name="T18">]</text:span><text:span text:style-name="T24">(</text:span><text:span text:style-name="T33">t_s204_</text:span><text:span text:style-name="T34">medecin</text:span><text:span text:style-name="T28">)</text:span><text:span text:style-name="T42">)</text:span><text:span text:style-name="T28"> </text:span><text:span text:style-name="T16">∞ </text:span><text:span text:style-name="T24">π</text:span><text:span text:style-name="T26">[</text:span><text:span text:style-name="T18">nom</text:span><text:span text:style-name="T41">_hop,idHop</text:span><text:span text:style-name="T26">]</text:span><text:span text:style-name="T42">(</text:span><text:span text:style-name="T30">σ</text:span><text:span text:style-name="T18">[n</text:span><text:span text:style-name="T19">om_hop =</text:span><text:span text:style-name="T18"> ‘</text:span><text:span text:style-name="T44">Jacques Monod</text:span><text:span text:style-name="T19">’</text:span><text:span text:style-name="T18">]</text:span><text:span text:style-name="T32"> </text:span><text:span text:style-name="T17">(t_s204_</text:span><text:span text:style-name="T45">hopital</text:span><text:span text:style-name="T17">)</text:span><text:span text:style-name="T42">)</text:span><text:span text:style-name="T17"> </text:span><text:span text:style-name="T36">∞</text:span><text:span text:style-name="T17"> </text:span><text:span text:style-name="T24">π</text:span><text:span text:style-name="T26">[</text:span><text:span text:style-name="T41">id</text:span><text:span text:style-name="T46">Med</text:span><text:span text:style-name="T41">,idPat</text:span><text:span text:style-name="T26">]</text:span><text:span text:style-name="T17">(t_s204_</text:span><text:span text:style-name="T34">consulte</text:span><text:span text:style-name="T17">) </text:span><text:span text:style-name="T36">∞ </text:span><text:span text:style-name="T17"><text:s/></text:span><text:span text:style-name="T24">π</text:span><text:span text:style-name="T26">[</text:span><text:span text:style-name="T18">nom_</text:span><text:span text:style-name="T27">pat,</text:span><text:span text:style-name="T41">idPat</text:span><text:span text:style-name="T26">]</text:span><text:span text:style-name="T17">(t_s204_</text:span><text:span text:style-name="T34">patient)</text:span><text:span text:style-name="T17">)</text:span></text:p>
      <text:p text:style-name="P13"><text:span text:style-name="T17"/></text:p>
      <text:p text:style-name="P14">7. Noms des patients n'ayant consulté qu'à l'hôpital Jacques Monod.</text:p>
      <text:p text:style-name="P15"><text:span text:style-name="T17"/></text:p>
      <text:p text:style-name="P16">π<text:span text:style-name="T47">nom_pat​</text:span>(t_s204_patient⋈(π<text:span text:style-name="T47">idPat​</text:span>(t_s204_consulte⋈π<text:span text:style-name="T47">idMed​</text:span>(t_s204_medecin⋈σ<text:span text:style-name="T47">nom_hop=′Jacques Monod′</text:span>​(t_s204_hopital)))−π<text:span text:style-name="T47">idPat​</text:span>(t_s204_consulte⋈π<text:span text:style-name="T47">idMed​</text:span>(t_s204_medecin⋈σ<text:span text:style-name="T47">nom_hop!= ‘Jacques Monod’​</text:span>(t_s204_hopital))))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08:44:59.071000000</meta:creation-date>
    <dc:date>2026-05-05T10:49:41.054120720</dc:date>
    <meta:editing-duration>PT1H34M8S</meta:editing-duration>
    <meta:editing-cycles>28</meta:editing-cycles>
    <meta:generator>LibreOffice/25.2.3.2$Linux_X86_64 LibreOffice_project/520$Build-2</meta:generator>
    <meta:document-statistic meta:table-count="0" meta:image-count="0" meta:object-count="0" meta:page-count="1" meta:paragraph-count="14" meta:word-count="124" meta:character-count="1409" meta:non-whitespace-character-count="1093"/>
  </office:meta>
</office:document-meta>
</file>